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38cm" fo:min-width="3.99cm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893cm" fo:min-width="1.522cm" loext:decorative="false"/>
    </style:style>
    <style:style style:name="gr3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425cm" fo:min-width="0cm" loext:decorative="false"/>
    </style:style>
    <style:style style:name="gr4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655cm" fo:min-width="0.453cm" loext:decorative="false"/>
    </style:style>
    <style:style style:name="gr6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655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8.89cm" svg:x="8.6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58cm" svg:height="4.445cm" svg:x="11.794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953cm" svg:x="13.382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1.607cm" svg:height="0.56cm" draw:transform="rotate (-0.662003385281449) translate (12.1338897470745cm 13.2211592838449cm)" svg:viewBox="0 0 1608 561" svg:d="M0 11c96 5 196 10 292-7 95-17 184 20 266 71 87 54 84 148 130 215 47 69 90 144 182 174 90 29 190 66 283 29 93-36 200 12 291-44l105 24 38 75 21 13">
          <text:p/>
        </draw:path>
        <draw:path draw:style-name="gr4" draw:text-style-name="P4" draw:layer="layout" svg:width="1.174cm" svg:height="0.909cm" draw:transform="rotate (-2.78100763012777) translate (14.2069842604836cm 13.5716050071418cm)" svg:viewBox="0 0 1175 910" svg:d="M0 907c91 15 182-31 246-93 60-60 109-135 130-217 21-85 88-155 179-175 94-21 177-89 238-162 67-80 155-126 233-187l104-41 45-32">
          <text:p/>
        </draw:path>
        <draw:path draw:style-name="gr4" draw:text-style-name="P4" draw:layer="layout" svg:width="1.4cm" svg:height="0.514cm" draw:transform="rotate (0.785398163397448) translate (11.951551579052cm 15.898551579052cm)" svg:viewBox="0 0 1401 515" svg:d="M0 513c101 6 210 6 300-43 73-40 143-90 219-123 76-32 131-95 203-139 71-43 110-129 182-171 88-51 203-44 299-10l85 32 70 48 43 20">
          <text:p/>
        </draw:path>
        <draw:path draw:style-name="gr4" draw:text-style-name="P4" draw:layer="layout" svg:width="0.98cm" svg:height="0.502cm" draw:transform="rotate (2.30191475045532) translate (13.993cm 16.465cm)" svg:viewBox="0 0 981 503" svg:d="M0 0c116 6 231 11 344 13 92 2 169 56 231 116 60 58 83 143 149 196 63 49 116 113 186 155l71 23">
          <text:p/>
        </draw:path>
        <draw:path draw:style-name="gr4" draw:text-style-name="P4" draw:layer="layout" svg:width="0.493cm" svg:height="0.199cm" draw:transform="rotate (3.02727358758416) translate (14.5888835527929cm 14.934363097061cm)" svg:viewBox="0 0 494 200" svg:d="M0 141c83 8 178-4 248 40 106 67 172-58 206-123l40-58">
          <text:p/>
        </draw:path>
        <draw:path draw:style-name="gr4" draw:text-style-name="P4" draw:layer="layout" svg:width="0.794cm" svg:height="0.699cm" draw:transform="rotate (-2.67262268357892) translate (14.6180367944167cm 14.011751783992cm)" svg:viewBox="0 0 795 700" svg:d="M0 699c108 8 209-36 307-73 90-33 183-77 245-147 52-58 70-144 79-224 8-76 5-185 96-222l68-33">
          <text:p/>
        </draw:path>
        <draw:path draw:style-name="gr4" draw:text-style-name="P4" draw:layer="layout" svg:width="1.465cm" svg:height="0.584cm" draw:transform="rotate (-1.8158405537749) translate (13.3506133449554cm 12.7369428777374cm)" svg:viewBox="0 0 1466 585" svg:d="M0 585c97-9 194-16 291-18 87-2 176-13 264-4 88 8 181-13 253-79 66-61 169-89 215-170 48-87 143-115 225-158 78-39 117-150 218-156">
          <text:p/>
        </draw:path>
        <draw:path draw:style-name="gr4" draw:text-style-name="P4" draw:layer="layout" svg:width="1.375cm" svg:height="0.195cm" svg:x="11.808cm" svg:y="14.682cm" svg:viewBox="0 0 1376 196" svg:d="M0 44c91 8 180-1 272-7 86-5 171-26 257-30 87-4 178-13 265 0 84 13 162 59 249 75 97 18 142 106 242 98l76 8 15 8">
          <text:p/>
        </draw:path>
        <draw:path draw:style-name="gr4" draw:text-style-name="P4" draw:layer="layout" svg:width="0.709cm" svg:height="0.109cm" draw:transform="rotate (-0.114319066005629) translate (12.6148517740207cm 15.3410350997154cm)" svg:viewBox="0 0 710 110" svg:d="M0 51c84-2 167 18 248 40 80 22 168 29 243-5l73-31 87-33 59-22">
          <text:p/>
        </draw:path>
        <draw:path draw:style-name="gr4" draw:text-style-name="P4" draw:layer="layout" svg:width="0.418cm" svg:height="0.445cm" draw:transform="rotate (-1.76819306519546) translate (13.0691157654678cm 14.3304236888633cm)" svg:viewBox="0 0 419 446" svg:d="M0 446c81-7 192 17 223-114 24-102 61-208 144-283l52-49">
          <text:p/>
        </draw:path>
        <draw:path draw:style-name="gr4" draw:text-style-name="P4" draw:layer="layout" svg:width="1.081cm" svg:height="0.08cm" draw:transform="rotate (-1.68511539280053) translate (13.5473421475625cm 13.3898764003072cm)" svg:viewBox="0 0 1082 81" svg:d="M0 16c86 20 173-3 260 16 77 16 158-5 235-19 84-15 172-20 259 0 83 20 158 99 249 55l79-47">
          <text:p/>
        </draw:path>
        <draw:path draw:style-name="gr4" draw:text-style-name="P4" draw:layer="layout" svg:width="0.46cm" svg:height="0.213cm" draw:transform="rotate (-1.93138135025693) translate (14.386cm 14.741cm)" svg:viewBox="0 0 461 214" svg:d="M0 0c90 3 176 24 268 44 95 21 167 81 183 166l10 4">
          <text:p/>
        </draw:path>
        <draw:path draw:style-name="gr4" draw:text-style-name="P4" draw:layer="layout" svg:width="0.361cm" svg:height="0.345cm" draw:transform="rotate (-2.78100763012777) translate (13.766cm 16.185cm)" svg:viewBox="0 0 362 346" svg:d="M0 0c78 3 170 9 223 75l56 87 41 104 42 80">
          <text:p/>
        </draw:path>
        <draw:path draw:style-name="gr4" draw:text-style-name="P4" draw:layer="layout" svg:width="0.439cm" svg:height="0.332cm" draw:transform="rotate (0.293215314335047) translate (13.6621506121292cm 15.3315315110472cm)" svg:viewBox="0 0 440 333" svg:d="M0 332c88-17 178 0 268 1 101 1 149-98 172-177l-14-83-57-73">
          <text:p/>
        </draw:path>
        <draw:path draw:style-name="gr4" draw:text-style-name="P4" draw:layer="layout" svg:width="0.54cm" svg:height="0.24cm" draw:transform="rotate (-1.03044239037745) translate (12.2859208430901cm 14.5954658547346cm)" svg:viewBox="0 0 541 241" svg:d="M0 240c94 6 204-9 271-84 63-71 158-97 241-138l29-18">
          <text:p/>
        </draw:path>
        <draw:custom-shape draw:style-name="gr5" draw:text-style-name="P5" draw:layer="layout" svg:width="0.953cm" svg:height="1.905cm" draw:transform="rotate (0.174532925199433) translate (12.747cm 18.17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1.905cm" svg:x="13.064cm" svg:y="20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1.905cm" draw:transform="rotate (0.174532925199433) translate (9.572cm 1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" draw:layer="layout" svg:width="0.953cm" svg:height="1.905cm" svg:x="9.572cm" svg:y="20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88cm" svg:height="1.906cm" draw:transform="rotate (0.174532925199433) translate (9.889cm 14.9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0.487cm" svg:height="1.905cm" draw:transform="rotate (2.03959176388057) translate (10.11cm 17.827cm)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21:38:32.854579719</meta:creation-date>
    <dc:date>2026-05-27T22:01:27.098342440</dc:date>
    <meta:editing-duration>PT2M16S</meta:editing-duration>
    <meta:editing-cycles>1</meta:editing-cycles>
    <meta:document-statistic meta:object-count="24"/>
    <meta:generator>LibreOffice/25.8.6.2$Linux_X86_64 LibreOffice_project/580$Build-2</meta:generator>
  </office:meta>
</office:document-meta>
</file>